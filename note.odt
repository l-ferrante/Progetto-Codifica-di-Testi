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Mono" svg:font-family="'Noto Mono'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b8a" officeooo:paragraph-rsid="0002ab8a"/>
    </style:style>
    <style:style style:name="P2" style:family="paragraph" style:parent-style-name="Standard">
      <style:text-properties style:font-name="Noto Mono" fo:font-size="8pt" officeooo:rsid="0002ab8a" officeooo:paragraph-rsid="0003d418" style:font-size-asian="8pt" style:font-size-complex="8pt"/>
    </style:style>
    <style:style style:name="P3" style:family="paragraph" style:parent-style-name="Standard">
      <style:text-properties officeooo:rsid="0007bb84" officeooo:paragraph-rsid="0002ab8a"/>
    </style:style>
    <style:style style:name="P4" style:family="paragraph" style:parent-style-name="Standard">
      <style:text-properties style:font-name="Noto Mono" fo:font-size="8pt" fo:font-style="normal" officeooo:rsid="0002ab8a" officeooo:paragraph-rsid="0002ab8a" style:font-size-asian="8pt" style:font-style-asian="normal" style:font-size-complex="8pt" style:font-style-complex="normal"/>
    </style:style>
    <style:style style:name="P5" style:family="paragraph" style:parent-style-name="Standard">
      <style:text-properties style:font-name="Noto Mono" fo:font-size="8pt" fo:font-style="normal" officeooo:rsid="0002ab8a" officeooo:paragraph-rsid="0003d418" style:font-size-asian="8pt" style:font-style-asian="normal" style:font-size-complex="8pt" style:font-style-complex="normal"/>
    </style:style>
    <style:style style:name="P6" style:family="paragraph" style:parent-style-name="Standard">
      <style:text-properties fo:font-style="normal" officeooo:rsid="0007bb84" officeooo:paragraph-rsid="0007bb84" style:font-style-asian="normal" style:font-style-complex="normal"/>
    </style:style>
    <style:style style:name="P7" style:family="paragraph" style:parent-style-name="Standard">
      <style:text-properties officeooo:rsid="0002a2f8" officeooo:paragraph-rsid="000a5598"/>
    </style:style>
    <style:style style:name="P8" style:family="paragraph" style:parent-style-name="Standard">
      <style:text-properties officeooo:rsid="0002ab8a" officeooo:paragraph-rsid="000a5598"/>
    </style:style>
    <style:style style:name="T1" style:family="text">
      <style:text-properties officeooo:rsid="0002ab4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8ac07" style:font-style-asian="italic" style:font-style-complex="italic"/>
    </style:style>
    <style:style style:name="T4" style:family="text">
      <style:text-properties fo:font-style="italic" officeooo:rsid="000d4621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officeooo:rsid="000a5598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3d418" style:font-style-asian="normal" style:font-style-complex="normal"/>
    </style:style>
    <style:style style:name="T9" style:family="text">
      <style:text-properties fo:font-style="normal" officeooo:rsid="000a5598" style:font-style-asian="normal" style:font-style-complex="normal"/>
    </style:style>
    <style:style style:name="T10" style:family="text">
      <style:text-properties fo:font-style="normal" officeooo:rsid="000bb712" style:font-style-asian="normal" style:font-style-complex="normal"/>
    </style:style>
    <style:style style:name="T11" style:family="text">
      <style:text-properties fo:font-style="normal" officeooo:rsid="000d4621" style:font-style-asian="normal" style:font-style-complex="normal"/>
    </style:style>
    <style:style style:name="T12" style:family="text">
      <style:text-properties fo:font-style="normal" officeooo:rsid="000dcc5d" style:font-style-asian="normal" style:font-style-complex="normal"/>
    </style:style>
    <style:style style:name="T13" style:family="text">
      <style:text-properties fo:font-style="normal" fo:font-weight="bold" officeooo:rsid="000a5598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officeooo:rsid="000a5598" style:font-style-asian="normal" style:font-weight-asian="normal" style:font-style-complex="normal" style:font-weight-complex="normal"/>
    </style:style>
    <style:style style:name="T15" style:family="text">
      <style:text-properties officeooo:rsid="000a5598"/>
    </style:style>
    <style:style style:name="T1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5">Per quanto possibile,</text:span> il progetto di codifica intende <text:span text:style-name="T16">seguire le norme del progetto COVerLess</text:span>. </text:p>
      <text:p text:style-name="P7"><text:span text:style-name="T15">P</text:span><text:span text:style-name="T1">er </text:span><text:span text:style-name="T15">questo motivo </text:span><text:span text:style-name="T1">alcuni elementi dell’intestazione (teiHeader) sono ripresi dal modello di codifica indicato dal progetto, </text:span><text:span text:style-name="T15">come suggerito dalle indicazioni nelle linee guida</text:span><text:span text:style-name="T1">.</text:span></text:p>
      <text:p text:style-name="P8">Inoltre, la <text:span text:style-name="T16">gestione delle entità nominate</text:span> è <text:span text:style-name="T15">stata tratta da</text:span> quella messa in atto dal progetto COVerLess, vale a dire la marcatura delle stesse nel documento xml corredata dall’aggiunta dell’attributo <text:span text:style-name="T5">ref</text:span><text:span text:style-name="T7"> che rimanda all’elemento codificato in una lista di entità nominate esterna, in cui dell’entità stessa viene data una definizione e una breve descrizione, o ulteriori dati, dove possibile. </text:span><text:span text:style-name="T9">Tuttavia, rispetto all’approccio di COVerLess (una lista per ogni tipo di dato; es: la lista per i luoghi, quella per le persone, ecc…) è stato deciso di </text:span><text:span text:style-name="T13">unificare le liste delle entità nominali</text:span><text:span text:style-name="T14"> in un unico file .xml, </text:span><text:span text:style-name="T6">entita_nominate.xml</text:span><text:span text:style-name="T14">. E tuttavia il modo di codificare e di definire le entità nominale (luoghi, persone, organizzazioni) è tratto da quello di COVerLess.</text:span></text:p>
      <text:p text:style-name="P8"><text:span text:style-name="T7"><text:line-break/></text:span><text:span text:style-name="T10">Un</text:span><text:span text:style-name="T7"> esempio:</text:span></text:p>
      <text:p text:style-name="P4">&lt;place ref="<text:span text:style-name="T15">entita_nominate</text:span>.xml#CA"&gt;Cagliari&lt;/place&gt;</text:p>
      <text:p text:style-name="P1"><text:span text:style-name="T7">con, nella </text:span><text:span text:style-name="T12">documento</text:span><text:span text:style-name="T7"> </text:span><text:span text:style-name="T4">entita_nominate</text:span><text:span text:style-name="T2">.xml</text:span><text:span text:style-name="T7"> l’elemento #CA:</text:span></text:p>
      <text:p text:style-name="P4">&lt;place xml:id="CA" type="real"&gt;</text:p>
      <text:p text:style-name="P4"><text:tab/>&lt;placeName ref="https://www.geonames.org/2525473/cagliari.html"&gt;Cagliari&lt;/placeName&gt;</text:p>
      <text:p text:style-name="P4"><text:tab/>&lt;country key="IT"&gt;Italia&lt;/country&gt;</text:p>
      <text:p text:style-name="P2"><text:span text:style-name="T7"><text:tab/>&lt;note resp="#LF" source="https://www.treccani.it/enciclopedia/cagliari/"&gt;&lt;p&gt;Comune della <text:tab/><text:tab/>Sardegna meridionale (133,5 km2 con 149.883 ab. al censimento del 2011, divenuti <text:tab/><text:tab/><text:tab/>151.005 secondo rilevamenti ISTAT del 2020, detti cagliaritani), città metropolitana <text:tab/><text:tab/>e capoluogo di </text:span><text:span text:style-name="T8">r</text:span><text:span text:style-name="T7">egione; sede del governo regionale sardo.&lt;/p&gt;</text:span></text:p>
      <text:p text:style-name="P5"><text:tab/>&lt;/note&gt;</text:p>
      <text:p text:style-name="P4">&lt;/place&gt;</text:p>
      <text:p text:style-name="P3"><text:span text:style-name="T7"/></text:p>
      <text:p text:style-name="P6">asd</text:p>
      <text:p text:style-name="P1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Mono" svg:font-family="'Noto Mono'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11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1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2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23:31:20.371046753</meta:creation-date>
    <dc:date>2026-06-18T20:01:31.141141371</dc:date>
    <meta:editing-duration>PT14M48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211" meta:character-count="1649" meta:non-whitespace-character-count="1438"/>
  </office:meta>
</office:document-meta>
</file>